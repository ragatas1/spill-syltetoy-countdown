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b3fe" officeooo:paragraph-rsid="0006b3fe"/>
    </style:style>
    <style:style style:name="P2" style:family="paragraph" style:parent-style-name="Standard">
      <style:text-properties officeooo:rsid="0007c7eb" officeooo:paragraph-rsid="0007c7eb"/>
    </style:style>
    <style:style style:name="P3" style:family="paragraph" style:parent-style-name="Standard">
      <style:text-properties officeooo:rsid="0006dff9" officeooo:paragraph-rsid="0006dff9"/>
    </style:style>
    <style:style style:name="T1" style:family="text">
      <style:text-properties officeooo:rsid="0006df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 student</text:p>
      <text:p text:style-name="P1">raised by his two parents in holmenkollen, they are still together, but its unclear whether they love each other</text:p>
      <text:p text:style-name="P2">someone in his family invented the paperclip, and they have been living of that wealth ever since</text:p>
      <text:p text:style-name="P1"/>
      <text:p text:style-name="P1">went to ullern vgs studying stud<text:span text:style-name="T1">i</text:span>espess</text:p>
      <text:p text:style-name="P1">took a half year working at his fathers company, before taking exphil and exphac in bali</text:p>
      <text:p text:style-name="P1">took a BS masters (business strategy) at BI <text:span text:style-name="T1">in Bergen</text:span></text:p>
      <text:p text:style-name="P1">been living in the town where the sun never rises for half a year now, doesn’t have a job, but seems to be doing fine</text:p>
      <text:p text:style-name="P1"/>
      <text:p text:style-name="P1">has had a girlfriend for three years now, although he cheats on her occasionally, she probably does the same, although he would kill her if he found out</text:p>
      <text:p text:style-name="P1"/>
      <text:p text:style-name="P3">always has a cool idea for an app, right now he’s thinking about one where you could virtually pressure your friends to drink</text:p>
      <text:p text:style-name="P3"/>
      <text:p text:style-name="P3">his favorite movies are fight club, American psycho and pulp fiction</text:p>
      <text:p text:style-name="P3">his favorite game is call of duty, the newest one, I mean, obviously, its the best game right?</text:p>
      <text:p text:style-name="P3">He likes a lot of hiphop, but doesn’t really listen to the lyrics, big fan of drake</text:p>
      <text:p text:style-name="P3"/>
      <text:p text:style-name="P3">frequents Heidi’s, he doesn’t seem to like it, but he keeps coming back either way</text:p>
      <text:p text:style-name="P3"/>
      <text:p text:style-name="P3">he might have a power-bank, but he wouldn’t give it to you, although he might be the key to get someone else to give you one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22T21:52:40.846852254</meta:creation-date>
    <dc:date>2026-07-22T22:56:48.864248517</dc:date>
    <meta:editing-duration>PT37M53S</meta:editing-duration>
    <meta:editing-cycles>1</meta:editing-cycles>
    <meta:document-statistic meta:table-count="0" meta:image-count="0" meta:object-count="0" meta:page-count="1" meta:paragraph-count="14" meta:word-count="233" meta:character-count="1245" meta:non-whitespace-character-count="1025"/>
    <meta:generator>LibreOffice/26.2.4.2$Linux_X86_64 LibreOffice_project/620$Build-2</meta:generator>
  </office:meta>
</office:document-meta>
</file>